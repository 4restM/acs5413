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A00000AECF4FE320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fo:font-size="11pt" style:font-size-asian="11pt"/>
    </style:style>
    <style:style style:name="T2" style:family="text">
      <style:text-properties officeooo:rsid="00029791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Forrest Miller - </text:span>ACS5413 - <text:span text:style-name="T2">Assignment </text:span>1<text:line-break/></text:h>
      <text:p text:style-name="Standard">Per<text:span text:style-name="T2"> our live session</text:span>, an Expo Go screenshot on a physical device was used in place of <text:span text:style-name="T2">AVD</text:span>.</text:p>
      <text:h text:style-name="Heading_20_2" text:outline-level="2"/>
      <text:p text:style-name="Standard"><draw:frame draw:style-name="fr1" draw:name="Picture 1" text:anchor-type="as-char" svg:width="3in" svg:height="6.502in" draw:z-index="0"><draw:image xlink:href="Pictures/100000000000050A00000AECF4FE320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6-20T13:36:28.540530856</dc:date>
    <meta:editing-duration>PT6M39S</meta:editing-duration>
    <meta:generator>LibreOffice/24.2.7.2$Linux_X86_64 LibreOffice_project/420$Build-2</meta:generator>
    <meta:document-statistic meta:table-count="0" meta:image-count="1" meta:object-count="0" meta:page-count="1" meta:paragraph-count="3" meta:word-count="25" meta:character-count="130" meta:non-whitespace-character-count="106"/>
    <meta:user-defined meta:name="AppVersion">14.0000</meta:user-defined>
    <meta:template xlink:type="simple" xlink:actuate="onRequest" xlink:title="Normal.dotm" xlink:href=""/>
  </office:meta>
</office:document-meta>
</file>